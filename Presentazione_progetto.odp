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690000010A5E9AA981FB02CC11.png" manifest:media-type="image/png"/>
  <manifest:file-entry manifest:full-path="Pictures/100000010000051B000000E85A61E65D6329AD83.png" manifest:media-type="image/png"/>
  <manifest:file-entry manifest:full-path="Pictures/10000001000003BD000001142FC9D9E5C3566378.png" manifest:media-type="image/png"/>
  <manifest:file-entry manifest:full-path="Pictures/1000000100000416000001781FD02E5AB8B45787.png" manifest:media-type="image/png"/>
  <manifest:file-entry manifest:full-path="Pictures/100000010000042C000000B9A6651998934763B0.png" manifest:media-type="image/png"/>
  <manifest:file-entry manifest:full-path="Pictures/10000001000003B9000003C1EE1DD42092E5E1FB.png" manifest:media-type="image/png"/>
  <manifest:file-entry manifest:full-path="Pictures/10000001000003B9000003C11CB47519DE42E320.png" manifest:media-type="image/png"/>
  <manifest:file-entry manifest:full-path="Pictures/10000001000000870000001D9ED844525175EE1A.png" manifest:media-type="image/png"/>
  <manifest:file-entry manifest:full-path="Pictures/10000001000003300000026409AFC8EFE5687064.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tb-rl"/>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outline1">
      <style:graphic-properties draw:textarea-horizontal-align="right" draw:textarea-vertical-align="justify" draw:auto-grow-height="false" draw:auto-grow-width="false"/>
      <style:paragraph-properties style:writing-mode="lr-tb"/>
    </style:style>
    <style:style style:name="pr3" style:family="presentation" style:parent-style-name="Bullet_20_3-notes">
      <style:graphic-properties draw:fill-color="#ffffff" fo:min-height="13.364cm"/>
      <style:paragraph-properties style:writing-mode="lr-tb"/>
    </style:style>
    <style:style style:name="pr4" style:family="presentation" style:parent-style-name="Bullet_20_3-outline1">
      <style:graphic-properties/>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fo:text-align="center"/>
    </style:style>
    <style:style style:name="P9" style:family="paragraph">
      <loext:graphic-properties draw:fill="none" draw:fill-color="#ffffff"/>
    </style:style>
    <style:style style:name="P10" style:family="paragraph">
      <loext:graphic-properties draw:fill-color="#ffffff"/>
      <style:paragraph-properties style:writing-mode="lr-tb"/>
      <style:text-properties fo:font-size="20pt"/>
    </style:style>
    <style:style style:name="P11" style:family="paragraph">
      <loext:graphic-properties draw:fill="none"/>
      <style:paragraph-properties fo:text-align="center" style:writing-mode="lr-tb"/>
    </style:style>
    <style:style style:name="P12" style:family="paragraph">
      <style:paragraph-properties fo:text-align="start"/>
    </style:style>
    <style:style style:name="P13" style:family="paragraph">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4" style:family="paragraph">
      <loext:graphic-properties draw:fill-color="#ffffff"/>
    </style:style>
    <style:style style:name="P15" style:family="paragraph">
      <style:text-properties fo:font-size="13.6999998092651pt" style:font-size-asian="13.6999998092651pt" style:font-size-complex="13.6999998092651pt"/>
    </style:style>
    <style:style style:name="P16" style:family="paragraph">
      <loext:graphic-properties draw:fill="none" draw:fill-color="#ffffff"/>
      <style:text-properties fo:font-size="13.6999998092651pt" style:font-size-asian="13.6999998092651pt" style:font-size-complex="13.6999998092651pt"/>
    </style:style>
    <style:style style:name="P17" style:family="paragraph">
      <loext:graphic-properties draw:fill-color="#ffffff"/>
      <style:text-properties fo:font-size="2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fo:font-size="20pt" style:font-size-asian="20pt" style:font-size-complex="20pt"/>
    </style:style>
    <style:style style:name="T4" style:family="text">
      <style:text-properties fo:font-size="15pt" style:font-size-asian="15pt" style:font-size-complex="15pt"/>
    </style:style>
    <style:style style:name="T5" style:family="text">
      <style:text-properties fo:font-size="18pt" style:font-size-asian="18pt" style:font-size-complex="18pt"/>
    </style:style>
    <style:style style:name="T6" style:family="text">
      <style:text-properties fo:font-size="14pt" style:font-size-asian="14pt" style:font-size-complex="14pt"/>
    </style:style>
    <style:style style:name="T7" style:family="text">
      <style:text-properties fo:font-variant="normal" fo:text-transform="none" style:use-window-font-color="true" loext:opacity="0%" style:text-outline="false" style:text-line-through-style="none" style:text-line-through-type="none" style:text-position="0% 100%" style:font-name="Liberation Sans" fo:font-size="14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size="16pt" style:font-size-asian="16pt" style:font-size-complex="16pt"/>
    </style:style>
    <style:style style:name="T9" style:family="text">
      <style:text-properties style:text-line-through-style="none" style:text-line-through-type="none"/>
    </style:style>
    <style:style style:name="T10" style:family="text">
      <style:text-properties style:text-line-through-style="solid" style:text-line-through-type="single" fo:font-size="14pt" style:font-size-asian="14pt" style:font-size-complex="14pt"/>
    </style:style>
    <style:style style:name="T11" style:family="text">
      <style:text-properties style:text-line-through-style="none" style:text-line-through-type="none" fo:font-size="14pt" style:font-size-asian="14pt" style:font-size-complex="14pt"/>
    </style:style>
    <style:style style:name="T12" style:family="text">
      <style:text-properties fo:font-size="13.6999998092651pt" style:font-size-asian="13.6999998092651pt" style:font-size-complex="13.699999809265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Progetto MCF</text:span></text:p>
          </draw:text-box>
        </draw:frame>
        <draw:frame draw:style-name="gr2" draw:text-style-name="P3" draw:layer="layout" svg:width="6.604cm" svg:height="1.373cm" svg:x="20.32cm" svg:y="12.859cm">
          <draw:text-box>
            <text:p><text:span text:style-name="T2">Federico Manni</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3">
        <office:forms form:automatic-focus="false" form:apply-design-mode="false"/>
        <draw:frame presentation:style-name="pr2" draw:text-style-name="P7" draw:layer="layout" svg:width="12.297cm" svg:height="13.134cm" svg:x="1.5cm" svg:y="0.666cm" presentation:class="outline" presentation:user-transformed="true">
          <draw:text-box>
            <text:list text:style-name="L2">
              <text:list-header>
                <text:p><text:span text:style-name="T3">RICHIESTA</text:span></text:p>
                <text:p><text:span text:style-name="T4">La richiesta è quella di effettuare l’analisi delle </text:span><text:span text:style-name="T4">curve di luce prodotte da 4 blazar, i cui dati sono </text:span><text:span text:style-name="T4">raccolti dal Fermi-LAT su base settimanale e </text:span><text:span text:style-name="T4">mensile, al fine di individuare segnali di </text:span><text:span text:style-name="T4">periodicità nello spettro di potenza.</text:span></text:p>
                <text:p><text:span text:style-name="T5">STRATEGIA</text:span></text:p>
              </text:list-header>
              <text:list-item>
                <text:p><text:span text:style-name="T6">Si effettua la trasformata di Fourier e si calcola lo </text:span><text:span text:style-name="T6">spettro di potenza della curva di luce. </text:span></text:p>
              </text:list-item>
              <text:list-item>
                <text:p><text:span text:style-name="T6">Ricerca dei picchi particolarmente significativi nello </text:span><text:span text:style-name="T6">spettro di potenza: </text:span></text:p>
                <text:list>
                  <text:list-header>
                    <text:p><text:span text:style-name="T6">- Ciò viene fatto calcolando la differenza tra i </text:span><text:span text:style-name="T6">punti dello spettro in scala logaritmica e la retta </text:span><text:span text:style-name="T6">di fit dello spettro, sempre in scala logaritmica, </text:span><text:span text:style-name="T6">che dovrebbe essere il nostro modello.</text:span></text:p>
                    <text:p><text:span text:style-name="T7">-La scala log. permette di gestire meglio le </text:span><text:span text:style-name="T7">grandi differenze dei valori dello spettro</text:span></text:p>
                    <text:p><text:span text:style-name="T7">- Individuazione del</text:span><text:span text:style-name="T6"> massimo valore di tutte </text:span><text:span text:style-name="T6">queste differenze</text:span></text:p>
                  </text:list-header>
                </text:list>
                <text:p><text:span text:style-name="T6"/></text:p>
              </text:list-item>
            </text:list>
          </draw:text-box>
        </draw:frame>
        <draw:frame draw:style-name="gr6" draw:text-style-name="P4" draw:layer="layout" svg:width="10cm" svg:height="10.083cm" svg:x="16cm" svg:y="5.417cm">
          <draw:image xlink:href="Pictures/10000001000003B9000003C11CB47519DE42E320.png" xlink:type="simple" xlink:show="embed" xlink:actuate="onLoad" draw:mime-type="image/png">
            <text:p text:style-name="P8"/>
          </draw:image>
        </draw:frame>
        <draw:frame draw:style-name="gr7" draw:text-style-name="P9" draw:layer="layout" svg:width="11cm" svg:height="4.659cm" svg:x="16cm" svg:y="1cm">
          <draw:text-box>
            <text:list text:style-name="L1">
              <text:list-item>
                <text:p><text:span text:style-name="T6">Generazione di molte SLC a partire dalla curva </text:span><text:span text:style-name="T6">originale </text:span></text:p>
              </text:list-item>
              <text:list-item>
                <text:p><text:span text:style-name="T6">Ricerca picchi più significativi per ogni SLC generata</text:span></text:p>
              </text:list-item>
              <text:list-item>
                <text:p><text:span text:style-name="T6">Calcolo probabilità che un picco nella SLC disti dal </text:span><text:span text:style-name="T6">proprio modello più del picco nella curva originale. := </text:span><text:span text:style-name="T6">(prob)</text:span></text:p>
              </text:list-item>
              <text:list-item>
                <text:p><text:span text:style-name="T6">La significatività è data come 1 - prob</text:span></text:p>
              </text:list-item>
            </text:list>
          </draw:text-box>
        </draw:frame>
        <presentation:notes draw:style-name="dp2">
          <office:forms form:automatic-focus="false" form:apply-design-mode="false"/>
          <draw:page-thumbnail draw:style-name="gr5" draw:layer="layout" svg:width="0.001cm" svg:height="0.001cm" svg:x="0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3">
        <office:forms form:automatic-focus="false" form:apply-design-mode="false"/>
        <draw:frame draw:style-name="gr8" draw:text-style-name="P11" draw:layer="layout" svg:width="10.413cm" svg:height="10.5cm" svg:x="17.087cm" svg:y="0cm" presentation:class="graphic" presentation:user-transformed="true">
          <draw:image xlink:href="Pictures/10000001000003B9000003C1EE1DD42092E5E1FB.png" xlink:type="simple" xlink:show="embed" xlink:actuate="onLoad" draw:mime-type="image/png">
            <text:p/>
          </draw:image>
        </draw:frame>
        <draw:frame presentation:style-name="pr4" draw:text-style-name="P7" draw:layer="layout" svg:width="13.5cm" svg:height="13.634cm" svg:x="1.5cm" svg:y="0.366cm" presentation:class="outline" presentation:user-transformed="true">
          <draw:text-box>
            <text:list text:style-name="L2">
              <text:list-header>
                <text:p text:style-name="P12"/>
                <text:p text:style-name="P12">CRITICITÀ</text:p>
              </text:list-header>
              <text:list-item>
                <text:p text:style-name="P12">I Blazar hanno un rumore rosa mentre lo shuffle che si esegue rompe la correlazione producendo curve con un rumore bianco.</text:p>
              </text:list-item>
              <text:list-item>
                <text:p text:style-name="P12">Rischio di sovrastimare la significatività alle basse frequenze </text:p>
                <text:p text:style-name="P12">IL CODICE</text:p>
                <text:p text:style-name="P12">STRUTTURA DATI</text:p>
              </text:list-item>
              <text:list-item>
                <text:p text:style-name="P12"><text:span text:style-name="T7">Creazione di una classe per le sorgenti i cui attributi </text:span><text:span text:style-name="T7">sono le grandezze utili calcolate. </text:span>Le istanze della classe sono poi salvate in un dizionario.</text:p>
              </text:list-item>
              <text:list-item>
                <text:p text:style-name="P12">Ogni attributo esiste in una istanza sia per la curva campionata mensilmente che settimanalmente.</text:p>
              </text:list-item>
              <text:list-item>
                <text:p text:style-name="P12">Alcuni attributi sono salvati in un dizionario</text:p>
                <text:p text:style-name="P12"/>
                <text:p text:style-name="P12"/>
              </text:list-item>
            </text:list>
          </draw:text-box>
        </draw:frame>
        <draw:frame draw:style-name="gr9" draw:text-style-name="P8" draw:layer="layout" svg:width="15cm" svg:height="2.598cm" svg:x="12.5cm" svg:y="11.642cm">
          <draw:image xlink:href="Pictures/100000010000042C000000B9A6651998934763B0.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3">
        <office:forms form:automatic-focus="false" form:apply-design-mode="false"/>
        <draw:frame presentation:style-name="pr4" draw:text-style-name="P7" draw:layer="layout" svg:width="12.297cm" svg:height="13.634cm" svg:x="1.916cm" svg:y="0.5cm" presentation:class="outline" presentation:user-transformed="true">
          <draw:text-box>
            <text:list text:style-name="L2">
              <text:list-item>
                <text:p text:style-name="P12">Per le curve di luce sintetiche non si sono usate strutture dati </text:p>
              </text:list-item>
              <text:list-item>
                <text:p text:style-name="P12">l’elevato numero di simulazioni rende inefficiente <text:s/>allocare e distruggere queste strutture.</text:p>
                <text:p text:style-name="P12"><text:span text:style-name="T8">FUNZIONI</text:span></text:p>
              </text:list-item>
              <text:list-item>
                <text:p text:style-name="P13"><text:span text:style-name="T6">Nel codice si fa uso di funzioni per svolgere compiti </text:span><text:span text:style-name="T6">che richiederebbero più righe e che vanno ripetuti </text:span><text:span text:style-name="T6">sia per le curve di luce originali che per le SLC</text:span></text:p>
              </text:list-item>
            </text:list>
          </draw:text-box>
        </draw:frame>
        <draw:frame presentation:style-name="pr4" draw:text-style-name="P7" draw:layer="layout" svg:width="11.797cm" svg:height="13.634cm" svg:x="14.703cm" svg:y="0.366cm" presentation:class="outline" presentation:user-transformed="true">
          <draw:text-box>
            <text:list text:style-name="L2">
              <text:list-header>
                <text:p text:style-name="P7"><text:span text:style-name="T8">PARSER</text:span></text:p>
              </text:list-header>
              <text:list-item>
                <text:p text:style-name="P7"><text:span text:style-name="T6">La generazione di grafici è subordinata all’uso di </text:span><text:span text:style-name="T6">righe di comando da terminale</text:span></text:p>
              </text:list-item>
              <text:list-item>
                <text:p text:style-name="P7"><text:span text:style-name="T6">Potendone generare molteplici, mandarli tutti a </text:span><text:span text:style-name="T6">schermo, sempre, sarebbe risultato pesante e </text:span><text:span text:style-name="T6">confusionario.</text:span></text:p>
              </text:list-item>
            </text:list>
          </draw:text-box>
        </draw:frame>
        <draw:frame draw:style-name="gr9" draw:text-style-name="P8" draw:layer="layout" svg:width="13.911cm" svg:height="5.5cm" svg:x="1.089cm" svg:y="10cm">
          <draw:image xlink:href="Pictures/1000000100000416000001781FD02E5AB8B45787.png" xlink:type="simple" xlink:show="embed" xlink:actuate="onLoad" draw:mime-type="image/png">
            <text:p/>
          </draw:image>
        </draw:frame>
        <draw:frame draw:style-name="gr9" draw:text-style-name="P8" draw:layer="layout" svg:width="13.871cm" svg:height="4cm" svg:x="14cm" svg:y="6cm">
          <draw:image xlink:href="Pictures/10000001000003BD000001142FC9D9E5C3566378.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3">
        <office:forms form:automatic-focus="false" form:apply-design-mode="false"/>
        <draw:frame presentation:style-name="pr4" draw:layer="layout" svg:width="12.097cm" svg:height="13.634cm" svg:x="1.5cm" svg:y="0.5cm" presentation:class="outline" presentation:user-transformed="true">
          <draw:text-box>
            <text:list text:style-name="L2">
              <text:list-item>
                <text:p><text:span text:style-name="T8">DETTAGLI DEL CODICE</text:span></text:p>
                <text:p><text:span text:style-name="T8">-</text:span><text:span text:style-name="T6">Si è cercato di usare quanto più possibile i metodi </text:span><text:span text:style-name="T6">di numpy e pandas per effettuare le manipolazioni </text:span><text:span text:style-name="T6">sugli array. Tutto è convertito in un array numpy</text:span></text:p>
                <text:p><text:span text:style-name="T8">-</text:span><text:span text:style-name="T6">L’eliminazione di ‘&lt;’ <text:s/>è avvenuta tramite metodo di </text:span><text:span text:style-name="T6">‘Pandas’ <text:s/>“.str.lstrip('&lt;')”: (Strip whitespaces </text:span><text:span text:style-name="T6">(including newlines) or a set of specified characters </text:span><text:span text:style-name="T6">from each string in the Series/Index from left side.)</text:span></text:p>
                <text:p><text:span text:style-name="T6">-La trasformazione da Df a Series </text:span><text:span text:style-name="T6">tramite .squeeze(). Non usarlo genera errore </text:span><text:span text:style-name="T6">con .str.lstrip()</text:span></text:p>
                <text:p><text:span text:style-name="T6">-La trasformazione da DataFrame a array 1d di </text:span><text:span text:style-name="T6">numpy tramite avviene tramite .to_numpy() </text:span><text:span text:style-name="T6">e <text:s/>.flatten(). Senza si avrebbe un array </text:span><text:span text:style-name="T6">ndimensionale [… [..], [..] …] che crea problemi con i </text:span><text:span text:style-name="T6">metodi di scipy successivi</text:span></text:p>
                <text:p><text:span text:style-name="T6"/></text:p>
              </text:list-item>
            </text:list>
          </draw:text-box>
        </draw:frame>
        <draw:frame presentation:style-name="pr4" draw:layer="layout" svg:width="12.297cm" svg:height="13.634cm" svg:x="14.213cm" svg:y="0.5cm" presentation:class="outline" presentation:user-transformed="true">
          <draw:text-box>
            <text:list text:style-name="L2">
              <text:list-header>
                <text:p text:style-name="P13"><text:span text:style-name="T6"/></text:p>
                <text:p text:style-name="P13"><text:span text:style-name="T6">- La trasformata è eseguita con il metodo fft.rfft() di </text:span><text:span text:style-name="T6">scipy poichè gli input sono tutti reali.</text:span></text:p>
                <text:p text:style-name="P13"><text:span text:style-name="T6">- Il valore a frequenza nulla è la componente </text:span><text:span text:style-name="T6">continua del segnale. Appare come un picco nello </text:span><text:span text:style-name="T6">spettro di potenza che schiaccia tutti gli altri valori, </text:span><text:span text:style-name="T6">quindi è arbitrariamente posta a zero. Non influenza </text:span><text:span text:style-name="T6">l’analisi</text:span></text:p>
                <text:p>- Quando si lavora con i logaritmi gli zeri sono un problema. I primi punti degli array dello spettro e delle frequenze sono ignorati tramite slicing ([1:]). Essendo zero entrambi numpy restituirebbe -inf</text:p>
                <text:p>-La generazione di SLC è problematica: può capitare che la FFT di una SLC restituisca uno zero a una qualsiasi frequenza</text:p>
              </text:list-header>
            </text:list>
          </draw:text-box>
        </draw:frame>
        <presentation:notes draw:style-name="dp2">
          <office:forms form:automatic-focus="false" form:apply-design-mode="false"/>
          <draw:page-thumbnail draw:style-name="gr5" draw:layer="layout" svg:width="0.001cm" svg:height="0.001cm" svg:x="0cm" svg:y="2.257cm" draw:page-number="5" presentation:class="page"/>
          <draw:frame presentation:style-name="pr3" draw:text-style-name="P14"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3">
        <office:forms form:automatic-focus="false" form:apply-design-mode="false"/>
        <draw:frame presentation:style-name="pr4" draw:layer="layout" svg:width="12.297cm" svg:height="9.134cm" svg:x="1.203cm" svg:y="5.366cm" presentation:class="outline" presentation:user-transformed="true">
          <draw:text-box>
            <text:list text:style-name="L2">
              <text:list-header>
                <text:p><text:span text:style-name="T9">-Per controllare la presenza di zeri si usano insieme </text:span><text:span text:style-name="T9">una maschera e il metodo di np.any()</text:span></text:p>
                <text:list>
                  <text:list-header>
                    <text:p><text:span text:style-name="T10">-</text:span><text:span text:style-name="T11">La maschera restituisce True in </text:span><text:span text:style-name="T11">corrispondenza degli zeri dell’array</text:span></text:p>
                    <text:p><text:span text:style-name="T11">-np.any() restituisce un booleano True se rileva </text:span><text:span text:style-name="T11">almeno un True nell’array, False altrimenti</text:span></text:p>
                    <text:p><text:span text:style-name="T11">-Se ciò accade la Ft va scartata e si deve </text:span><text:span text:style-name="T11">ricominciare.</text:span></text:p>
                    <text:p><text:span text:style-name="T11">- ==0.0 vale anche se il numero è complesso</text:span></text:p>
                    <text:p><text:span text:style-name="T11">-Il numero di iterazioni può essere superiore a </text:span><text:span text:style-name="T11">quello inizialmente previsto, quindi si usa un </text:span><text:span text:style-name="T11">ciclo while. Il contatore di cicli eseguiti aumenta </text:span><text:span text:style-name="T11">solo se il ciclo va a buon fine</text:span></text:p>
                  </text:list-header>
                </text:list>
              </text:list-header>
            </text:list>
          </draw:text-box>
        </draw:frame>
        <draw:frame draw:style-name="gr9" draw:text-style-name="P8" draw:layer="layout" svg:width="22.515cm" svg:height="5.081cm" draw:transform="skewX (0.00279252680319093) rotate (0.00279252680319093) translate (2.985cm -0.056cm)">
          <draw:image xlink:href="Pictures/100000010000051B000000E85A61E65D6329AD83.png" xlink:type="simple" xlink:show="embed" xlink:actuate="onLoad" draw:mime-type="image/png">
            <text:p/>
          </draw:image>
        </draw:frame>
        <draw:frame draw:style-name="gr9" draw:text-style-name="P8" draw:layer="layout" svg:width="9.55cm" svg:height="7.037cm" svg:x="15.95cm" svg:y="5.963cm">
          <draw:image xlink:href="Pictures/10000001000001690000010A5E9AA981FB02CC11.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3">
        <office:forms form:automatic-focus="false" form:apply-design-mode="false"/>
        <draw:frame presentation:style-name="pr4" draw:layer="layout" svg:width="12.297cm" svg:height="13.634cm" svg:x="1.3cm" svg:y="0.5cm" presentation:class="outline" presentation:user-transformed="true">
          <draw:text-box>
            <text:list text:style-name="L2">
              <text:list-header>
                <text:p>-senza np.copy() python crea un riferimento all’array originale, quindi sarebbe modificato quello.</text:p>
                <text:p>-Potrei creare le copie prima del ciclo while e poi eseguire lo shuffle sempre della stessa. Il codice sarebbe più leggero ma ci sarebbe una correlazione tra le SLC credo.</text:p>
                <text:p>-I parametri iniziali del fit, p0, sono uguali per tutti gli spettri. Se scipy non riesce a ottimizzarli restituisce un errore, cosa che non avviene.</text:p>
                <text:p>-Li si può indovinare graficamente plottando uno spettro di potenza </text:p>
                <text:p>-I grafici sono costruiti sfruttando un ciclo for nel dizionario delle istanze e il metodo “zip()”. Questo permette una corretta disposizione dei grafici all’inteno della fig. </text:p>
                <text:p>-Un riassunto dei dati è mandato a schermo ricostruendo un DataFrame Pandas con il metodo pd.DatFrame(). Prende in input un dizionario ed associa ad ogni chiave una colonna e al rispettivo valore le righe.</text:p>
              </text:list-header>
            </text:list>
          </draw:text-box>
        </draw:frame>
        <draw:frame draw:style-name="gr7" draw:text-style-name="P16" draw:layer="layout" svg:width="12.5cm" svg:height="12.825cm" svg:x="15cm" svg:y="0.5cm">
          <draw:text-box>
            <text:p text:style-name="P15"><text:span text:style-name="T4">Risulatati</text:span></text:p>
            <text:p text:style-name="P15"><text:span text:style-name="T4"/></text:p>
            <text:p text:style-name="P15"><text:span text:style-name="T12">- Per il blazar 4FGL_J1555.7+1111 è emerso un picco molto </text:span><text:span text:style-name="T12">significativo: </text:span></text:p>
            <text:p text:style-name="P15"><text:span text:style-name="T12"><text:tab/></text:span><text:span text:style-name="T12">-dall’analisi su campionamento settimanale alla </text:span><text:span text:style-name="T12"><text:tab/></text:span><text:span text:style-name="T12">frequenza di 0.001338 cicli/giorno la significatività </text:span><text:span text:style-name="T12"><text:tab/></text:span><text:span text:style-name="T12">è 1 </text:span><text:span text:style-name="T12">sempre, anche rimandando il codice più volte: </text:span><text:span text:style-name="T12"><text:tab/></text:span><text:span text:style-name="T12">non c’è mai </text:span><text:span text:style-name="T12">stato un picco alterttanto </text:span><text:span text:style-name="T12"><text:tab/></text:span><text:span text:style-name="T12"><text:tab/></text:span><text:span text:style-name="T12"><text:tab/></text:span><text:span text:style-name="T12">significativo in </text:span><text:span text:style-name="T12">nessuna slc</text:span></text:p>
            <text:p text:style-name="P15"><text:span text:style-name="T12"><text:tab/></text:span><text:span text:style-name="T12">-dall’analisi su campionamento mensile alla </text:span><text:span text:style-name="T12"><text:tab/></text:span><text:span text:style-name="T12"><text:tab/></text:span><text:span text:style-name="T12">frquenza di <text:s/>0.001335 cicli/giorno circa, la </text:span><text:span text:style-name="T12"><text:tab/></text:span><text:span text:style-name="T12"><text:tab/></text:span><text:span text:style-name="T12">significatività è circa 0,990. Cambia di poco </text:span><text:span text:style-name="T12"><text:tab/></text:span><text:span text:style-name="T12"><text:tab/></text:span><text:span text:style-name="T12">mandando il codice diverse volte se non si fissa il </text:span><text:span text:style-name="T12"><text:tab/></text:span><text:span text:style-name="T12">seed.</text:span><text:span text:style-name="T12"><text:tab/></text:span></text:p>
            <text:p text:style-name="P15"><text:span text:style-name="T12">Poiché la significatività è molto alta e poiché le frequenze per </text:span><text:span text:style-name="T12">le due analisi sono molto simili, questo risultato potrebbe </text:span><text:span text:style-name="T12">essere un indice di periodicità.</text:span></text:p>
            <text:p text:style-name="P15"><text:span text:style-name="T12">Va però considerato quanto detto all’inizio: le slc generate con </text:span><text:span text:style-name="T12">un random shuffle potrebbero portare <text:s/>ad una sovrastima per i </text:span><text:span text:style-name="T12">valori per le basse frequenze (indice 8 nel nostro caso)</text:span><text:span text:style-name="T12"><text:tab/></text:span><text:span text:style-name="T12"><text:tab/></text:span><text:span text:style-name="T12"><text:tab/></text:span><text:span text:style-name="T12"><text:tab/></text:span></text:p>
            <text:p text:style-name="P15"><text:span text:style-name="T4"/></text:p>
            <text:p text:style-name="P15"><text:span text:style-name="T4"/></text:p>
          </draw:text-box>
        </draw:frame>
        <presentation:notes draw:style-name="dp1">
          <office:forms form:automatic-focus="false" form:apply-design-mode="false"/>
          <draw:page-thumbnail draw:style-name="gr5" draw:layer="layout" svg:width="0.001cm" svg:height="0.001cm" svg:x="0cm" svg:y="2.257cm" draw:page-number="7" presentation:class="page"/>
          <draw:frame presentation:style-name="pr3"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it" fo:country="IT"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true" draw:fit-to-contour="false" fo:max-height="0cm" fo:max-width="0cm" fo:min-height="8.884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4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4pt" style:language-asian="zh" style:country-asian="CN" style:font-style-asian="normal" style:font-weight-asian="normal" style:font-name-complex="Noto Sans Devanagari" style:font-family-complex="'Noto Sans Devanagari'"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6-06-06T19:29:29.900926487</meta:creation-date>
    <meta:editing-duration>PT1H28M51S</meta:editing-duration>
    <meta:editing-cycles>9</meta:editing-cycles>
    <dc:date>2026-06-07T15:30:16.675140088</dc:date>
    <meta:document-statistic meta:object-count="280"/>
  </office:meta>
</office:document-meta>
</file>